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B000000BEEA2102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font-style="normal" style:text-underline-style="none" fo:font-weight="bold" officeooo:rsid="011183ec" officeooo:paragraph-rsid="00171566" style:font-size-asian="20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style:text-properties fo:font-weight="bold" officeooo:rsid="0090dc01" officeooo:paragraph-rsid="0090dc01" style:font-weight-asian="bold" style:font-weight-complex="bold"/>
    </style:style>
    <style:style style:name="P3" style:family="paragraph" style:parent-style-name="Standard">
      <style:paragraph-properties fo:text-align="start" style:justify-single-word="false"/>
      <style:text-properties fo:font-weight="bold" officeooo:rsid="0092c164" officeooo:paragraph-rsid="0092c164" style:font-weight-asian="bold" style:font-weight-complex="bold"/>
    </style:style>
    <style:style style:name="P4" style:family="paragraph" style:parent-style-name="Standard">
      <style:paragraph-properties fo:text-align="start" style:justify-single-word="false"/>
      <style:text-properties fo:font-weight="bold" officeooo:rsid="0094a109" officeooo:paragraph-rsid="0094a109" style:font-weight-asian="bold" style:font-weight-complex="bold"/>
    </style:style>
    <style:style style:name="P5" style:family="paragraph" style:parent-style-name="Standard" style:list-style-name="L2">
      <style:paragraph-properties fo:text-align="start" style:justify-single-word="false"/>
      <style:text-properties officeooo:paragraph-rsid="0090dc01"/>
    </style:style>
    <style:style style:name="P6" style:family="paragraph" style:parent-style-name="Standard">
      <style:text-properties fo:font-size="12pt" style:text-underline-style="none" fo:font-weight="bold" officeooo:rsid="00044232" officeooo:paragraph-rsid="00171566" style:font-size-asian="12pt" style:font-weight-asian="bold" style:font-size-complex="12pt" style:font-weight-complex="bold"/>
    </style:style>
    <style:style style:name="P7" style:family="paragraph" style:parent-style-name="Standard">
      <style:text-properties fo:font-size="12pt" style:text-underline-style="none" fo:font-weight="normal" officeooo:rsid="008b0e57" officeooo:paragraph-rsid="008b0e57"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8b0e57" officeooo:paragraph-rsid="0090dc01"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officeooo:rsid="002a3833" officeooo:paragraph-rsid="00171566" style:font-size-asian="12pt" style:font-size-complex="12pt"/>
    </style:style>
    <style:style style:name="P10" style:family="paragraph" style:parent-style-name="Standard">
      <style:paragraph-properties fo:text-align="center" style:justify-single-word="false"/>
      <style:text-properties fo:font-size="12pt" officeooo:rsid="002a3833" officeooo:paragraph-rsid="0090dc01" style:font-size-asian="12pt" style:font-size-complex="12pt"/>
    </style:style>
    <style:style style:name="P11" style:family="paragraph" style:parent-style-name="Standard">
      <style:paragraph-properties fo:text-align="start" style:justify-single-word="false"/>
      <style:text-properties fo:font-size="12pt" fo:font-weight="bold" officeooo:rsid="008f9b75" officeooo:paragraph-rsid="008f9b75"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8fe81f" officeooo:paragraph-rsid="008fe81f"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906054" officeooo:paragraph-rsid="00906054"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90dc01" officeooo:paragraph-rsid="0090dc01"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9148bb" officeooo:paragraph-rsid="009148bb"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9152aa" officeooo:paragraph-rsid="009152aa"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normal" officeooo:rsid="008fe81f" officeooo:paragraph-rsid="008fe81f"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9148bb" officeooo:paragraph-rsid="009148bb"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6pt" style:text-underline-style="none" fo:font-weight="bold" officeooo:rsid="008f9b75" officeooo:paragraph-rsid="008f9b75"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style:text-underline-style="none" fo:font-weight="bold" officeooo:rsid="0090dc01" officeooo:paragraph-rsid="0090dc01"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weight="normal" officeooo:rsid="0090dc01" officeooo:paragraph-rsid="0090dc01" style:font-weight-asian="normal" style:font-weight-complex="normal"/>
    </style:style>
    <style:style style:name="P22" style:family="paragraph" style:parent-style-name="Standard" style:list-style-name="L2">
      <style:paragraph-properties fo:text-align="start" style:justify-single-word="false"/>
      <style:text-properties officeooo:rsid="0090dc01" officeooo:paragraph-rsid="0090dc01"/>
    </style:style>
    <style:style style:name="P23" style:family="paragraph" style:parent-style-name="Standard">
      <style:paragraph-properties fo:text-align="start" style:justify-single-word="false"/>
      <style:text-properties officeooo:rsid="0090dc01" officeooo:paragraph-rsid="0090dc01"/>
    </style:style>
    <style:style style:name="T1" style:family="text">
      <style:text-properties fo:font-weight="normal" style:font-weight-asian="normal" style:font-weight-complex="normal"/>
    </style:style>
    <style:style style:name="T2" style:family="text">
      <style:text-properties fo:font-weight="normal" officeooo:rsid="009152aa" style:font-weight-asian="normal" style:font-weight-complex="normal"/>
    </style:style>
    <style:style style:name="T3" style:family="text">
      <style:text-properties fo:font-weight="normal" officeooo:rsid="0092c164" style:font-weight-asian="normal" style:font-weight-complex="normal"/>
    </style:style>
    <style:style style:name="T4" style:family="text">
      <style:text-properties style:use-window-font-color="true" loext:opacity="0%"/>
    </style:style>
    <style:style style:name="T5" style:family="text">
      <style:text-properties style:use-window-font-color="true" loext:opacity="0%" officeooo:rsid="00317479"/>
    </style:style>
    <style:style style:name="T6" style:family="text">
      <style:text-properties style:use-window-font-color="true" loext:opacity="0%" fo:font-style="italic" style:font-style-asian="italic" style:font-style-complex="italic"/>
    </style:style>
    <style:style style:name="T7" style:family="text">
      <style:text-properties style:use-window-font-color="true" loext:opacity="0%" fo:font-style="italic" officeooo:rsid="00317479" style:font-style-asian="italic" style:font-style-complex="italic"/>
    </style:style>
    <style:style style:name="T8" style:family="text">
      <style:text-properties officeooo:rsid="0089decb"/>
    </style:style>
    <style:style style:name="T9" style:family="text">
      <style:text-properties officeooo:rsid="008b0e57"/>
    </style:style>
    <style:style style:name="T10" style:family="text">
      <style:text-properties officeooo:rsid="00906054"/>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906054" style:font-size-asian="12pt" style:font-weight-asian="normal" style:font-size-complex="12pt" style:font-weight-complex="normal"/>
    </style:style>
    <style:style style:name="T13" style:family="text">
      <style:text-properties fo:font-size="12pt" fo:font-weight="normal" officeooo:rsid="0094a109" style:font-size-asian="12pt" style:font-weight-asian="normal" style:font-size-complex="12pt" style:font-weight-complex="normal"/>
    </style:style>
    <style:style style:name="T14"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Intro to Cyb</text:span><text:span text:style-name="T9">ersecurity</text:span><text:line-break/></text:p>
      <text:p text:style-name="P6">Learning Sources</text:p>
      <text:p text:style-name="P7"><text:span text:style-name="T5">-</text:span><text:span text:style-name="T6">"</text:span><text:span text:style-name="T7">Application Security</text:span><text:span text:style-name="T6"> </text:span><text:span text:style-name="T7">Engineering </text:span><text:span text:style-name="T6">-</text:span><text:span text:style-name="T7"> Study Plan</text:span><text:span text:style-name="T6">"</text:span><text:span text:style-name="T4"> </text:span></text:p>
      <text:p text:style-name="P7"><text:span text:style-name="T4"/></text:p>
      <text:p text:style-name="P7"><text:span text:style-name="T4"/></text:p>
      <text:p text:style-name="P19"><text:span text:style-name="T4">Application Security</text:span></text:p>
      <text:p text:style-name="P9"/>
      <text:p text:style-name="P11">Intro to AppSec</text:p>
      <text:p text:style-name="P11"><text:span text:style-name="T1">-The discipline of finding, fixing, and preventing security vulnerabilities in software. How can this software be broken?</text:span></text:p>
      <text:p text:style-name="P11"><text:span text:style-name="T1"/></text:p>
      <text:p text:style-name="P11"><text:span text:style-name="T1">-All software has an attack surface, covering input, auth flows, bad dependencies, etc. AppSec Eng map this surface, probe it for weaknesses, and work w/ dev teams to have the weaknesses corrected.</text:span></text:p>
      <text:p text:style-name="P11"><text:span text:style-name="T1"/></text:p>
      <text:p text:style-name="P11"><text:span text:style-name="T1">-AppSec spans the full SDLC. Secure code review during dev, static analysis during testing, dynamic analysis during application execution, and manual pen testing of both static and dynamic.</text:span></text:p>
      <text:p text:style-name="P11"><text:span text:style-name="T1"/></text:p>
      <text:p text:style-name="P11"><text:span text:style-name="T1">-OWASP Top 10 highlights most critical risks, such as SQL injection and XSS. Each risk is a vulnerability class an AppSec eng knows well, as a foundation understanding of how systems fail.</text:span></text:p>
      <text:p text:style-name="P11"><text:span text:style-name="T1"/></text:p>
      <text:p text:style-name="P12">Why AppSec Eng</text:p>
      <text:p text:style-name="P17">-My past 5 years in building web applications gives me an edge up, as I already know the languages, components, and systems that AppSec Eng work with, from building them myself.</text:p>
      <text:p text:style-name="P17"/>
      <text:p text:style-name="P17">-I understand not just what vulnerabilities exist, but why dev may write them to begin with, too</text:p>
      <text:p text:style-name="P17"/>
      <text:p text:style-name="P17">-Pretty much all main tech I used at my last job, from FastAPI (REST framework), to Python, to Docker, to writing tests is relevant for the switch to cyb.</text:p>
      <text:p text:style-name="P17"/>
      <text:p text:style-name="P17">-No endless leetcode cramming, dead dev job market, and convoluted <text:span text:style-name="T10">and disorganized </text:span>interview <text:span text:style-name="T10">formats. Still practical exams during interviews, but not like in dev, which has just become ridiculous.</text:span></text:p>
      <text:p text:style-name="P17"/>
      <text:p text:style-name="P13">Why Now<text:span text:style-name="T1"><text:line-break/>-It is currently July 2026. Web dev layoffs have been running strong for 3+ years now. There are few jobs and what jobs there are have hundreds of applicants each.</text:span></text:p>
      <text:p text:style-name="P13"><text:span text:style-name="T1"/></text:p>
      <text:p text:style-name="P13"><text:span text:style-name="T1">-Cybersecurity workers, in contrast, are in high demand, and cyb as a whole (sans very basic positions) has been more resistant to AI layoffs, with AppSec postings up 12% from the prior year.<text:line-break/><text:line-break/>-USA breach costs reached a record $10.22 million in 2025 and the IBM study that revealed this showed that nearly 2/3 orgs they studied are still recovering from breaches.<text:line-break/></text:span></text:p>
      <text:p text:style-name="P13"><text:span text:style-name="T1">-More than 45% of data breaches in 2024 involved at least one app-layer vulnerability and over 60% of Fortune 500 companies now integrate AppSec testing into their SDLC.</text:span></text:p>
      <text:p text:style-name="P13"><text:span text:style-name="T1"/></text:p>
      <text:p text:style-name="P13"><text:soft-page-break/><text:span text:style-name="T1">-There is a talent shortage for AppSec and demand is growing faster than it can be filled by worker. The AppSec testing market is growing 26.7% annually, too.<text:line-break/><text:line-break/></text:span>Target Role: Application Security Engineer</text:p>
      <text:p text:style-name="P13"><text:span text:style-name="T1">-AppSec Eng shares the same domain as Soft Eng (web). HTTP, APIs, auth flows, browser sec models, DB queries, etc. Instead of building the software, AppSec scans it for sec vulnerabilities, though.</text:span></text:p>
      <text:p text:style-name="P13"><text:span text:style-name="T1"/></text:p>
      <text:p text:style-name="P13"><text:span text:style-name="T1">-How can I break it like an attacker might, versus how can I build it.</text:span></text:p>
      <text:p text:style-name="P13"><text:span text:style-name="T1"/></text:p>
      <text:p text:style-name="P14"><text:span text:style-name="T1">-Daily responsibilities include:</text:span></text:p>
      <text:list text:style-name="L2">
        <text:list-item>
          <text:p text:style-name="P5"><text:span text:style-name="T12">Secure Code Review - reading code to find vulnerabilities</text:span></text:p>
        </text:list-item>
        <text:list-item>
          <text:p text:style-name="P22"><text:span text:style-name="T12">P</text:span><text:span text:style-name="T11">en Testing / DAST - Running BURP Suite on a staging env and testing HTTP requests</text:span></text:p>
        </text:list-item>
        <text:list-item>
          <text:p text:style-name="P22"><text:span text:style-name="T11">SAST - Running and maintaining SAST tooling in CI/CD</text:span></text:p>
        </text:list-item>
        <text:list-item>
          <text:p text:style-name="P22"><text:span text:style-name="T11">Threat Modeling - of new systems and features</text:span></text:p>
        </text:list-item>
        <text:list-item>
          <text:p text:style-name="P22"><text:span text:style-name="T11">Vulnerability Reporting &amp; Remediation Tracking - involvement when vulnerabilities found</text:span></text:p>
        </text:list-item>
        <text:list-item>
          <text:p text:style-name="P22"><text:span text:style-name="T11">Sec Training &amp; Dev Education - working w/ dev teams to help improve dev side cyb practices</text:span></text:p>
        </text:list-item>
        <text:list-item>
          <text:p text:style-name="P22"><text:span text:style-name="T11">Dependency &amp; Supply Chain Sec - SCA scanning, CVE monitoring, patch prioritization</text:span></text:p>
        </text:list-item>
      </text:list>
      <text:p text:style-name="P23"><text:span text:style-name="T11"/></text:p>
      <text:p text:style-name="P2"><text:span text:style-name="T14">Compensation</text:span></text:p>
      <text:p text:style-name="P2"><text:span text:style-name="T11">-Entry roles pulling in $90k to $130k, mid roles $130k to $180k, senior $170k to $240k</text:span></text:p>
      <text:p text:style-name="P2"><text:span text:style-name="T11"/></text:p>
      <text:p text:style-name="P2"><text:span text:style-name="T14">Job Market</text:span></text:p>
      <text:p text:style-name="P21"><text:span text:style-name="T14">-Good Philly opportunities via local health tech, financial services, enterprise, and legal tech companies such as Penn Medicine, Vanguard, and Comcast</text:span></text:p>
      <text:p text:style-name="P21"><text:span text:style-name="T14"/></text:p>
      <text:p text:style-name="P21"><text:span text:style-name="T14">-A huge number of cybersecurity jobs also allow remote flexibility, meaning the DC and NYC job markets open up, plus further away remote options</text:span></text:p>
      <text:p text:style-name="P21"/>
      <text:p text:style-name="P3"><text:span text:style-name="T14">Concerns</text:span></text:p>
      <text:p text:style-name="P3"><text:span text:style-name="T11">-</text:span><text:span text:style-name="T13">AI replacement - While this is a risk, the high level nature of AppSec makes unlikely in the immediate future</text:span></text:p>
      <text:p text:style-name="P3"><text:span text:style-name="T13"/></text:p>
      <text:p text:style-name="P4"><text:span text:style-name="T11">-Poor entry-level hiring - While Junior Sec Analysts may be being hired less, AppSec jobs are not as threatened, plus my huge portfolio on study plan completion gives me an edge up.<text:line-break/><text:line-break/>-The cert trap - This plan heavily focused on hands on and project work, not just certs, so the cert trap is avoided. Real knowledge and skills, not just note cards memorized.</text:span></text:p>
      <text:p text:style-name="P4"><text:span text:style-name="T11"/></text:p>
      <text:p text:style-name="P4"><text:span text:style-name="T11">-Philly job market - Philly is not a tech hub, but AppSec remote jobs are very common, too. Network locally, apply nationally.</text:span></text:p>
      <text:p text:style-name="P4"><text:span text:style-name="T11"/></text:p>
      <text:p text:style-name="P4"><text:span text:style-name="T11">-Red team scope creep - AppSec does involve app &amp; net level pen testing but the plan makes sure to only cover it as much as I need for AppSec and not going full red team level in what it teaches.</text:span></text:p>
      <text:p text:style-name="P8"/>
      <text:p text:style-name="P8"/>
      <text:p text:style-name="P8"/>
      <text:p text:style-name="P8"/>
      <text:p text:style-name="P8"/>
      <text:p text:style-name="P20"><text:soft-page-break/><text:span text:style-name="T4">Study Plan</text:span></text:p>
      <text:p text:style-name="P10"/>
      <text:p text:style-name="P14">Overview</text:p>
      <text:p text:style-name="P18">-Plan will take 7-9 months @ 21 hours studying per week. It is limited in hours due to needing to do part time gig work during this time, to support a simple lifestyle during career transition.</text:p>
      <text:p text:style-name="P18"/>
      <text:p text:style-name="P18">-The plan is centered around a lot of lab work and practical hands on work via PortSwigger, as well as gaining BSCP and Sec+ certs. It also covers a phase for interview prep.</text:p>
      <text:p text:style-name="P18"/>
      <text:p text:style-name="P15">Study Phases</text:p>
      <text:p text:style-name="P15"/>
      <text:p text:style-name="P15"><draw:frame draw:style-name="fr1" draw:name="Image1" text:anchor-type="char" svg:width="6.9252in" svg:height="1.3327in" draw:z-index="0"><draw:image xlink:href="Pictures/10000001000003DB000000BEEA21026E.png" xlink:type="simple" xlink:show="embed" xlink:actuate="onLoad" draw:mime-type="image/png"/></draw:frame></text:p>
      <text:p text:style-name="P15"><text:span text:style-name="T1">-Phase 0: Pre-Study - Refresh of existing web dev topics, completing FastAPI official docs, and building a new FastAPI app along w/ docs</text:span></text:p>
      <text:p text:style-name="P15"><text:span text:style-name="T1"/></text:p>
      <text:p text:style-name="P15"><text:span text:style-name="T1">-Phase I: AppSec Intro - A fun and short dip into offense and a taste of the attacker mindset via books, labs, and write-ups</text:span></text:p>
      <text:p text:style-name="P15"><text:span text:style-name="T1"/></text:p>
      <text:p text:style-name="P15"><text:span text:style-name="T1">-Phase II: Web &amp; Network - Material on web and network that may not be know from web dev. Alternative versus going full Net+.</text:span></text:p>
      <text:p text:style-name="P15"><text:span text:style-name="T1"/></text:p>
      <text:p text:style-name="P15"><text:span text:style-name="T1">-Phase III: Core Vulnerability Classes - A lot of OWASP here. The main classes used by attackers w/ hands on practice via PortSwigger labs and write-ups.</text:span></text:p>
      <text:p text:style-name="P15"><text:span text:style-name="T1"/></text:p>
      <text:p text:style-name="P15"><text:span text:style-name="T1">-Phase IV: Security Testing &amp; Tooling - BURP Suite mastery, along w/ in-depth SAST, DAST, SCA, and secrets scanning. Focus is PortSwigger and labs.</text:span><text:span text:style-name="T2"> BSCP exam prep + cert.</text:span></text:p>
      <text:p text:style-name="P15"><text:span text:style-name="T1"/></text:p>
      <text:p text:style-name="P15"><text:span text:style-name="T1">-Phase V: Cloud Sec - The basics of AWS Cloud Security, including shared responsibility, IAM, and common misconfigs via flaws.cloud, flaws2.cloud, and AWS docs.</text:span></text:p>
      <text:p text:style-name="P15"><text:span text:style-name="T1"/></text:p>
      <text:p text:style-name="P15"><text:span text:style-name="T1">-Phase VI: Secure Code Review &amp; Threat Modeling - How to do manual review and threat modeling </text:span><text:span text:style-name="T2">via OWASP Code Review Guide and other readings w/ documented code review and threat model project</text:span></text:p>
      <text:p text:style-name="P15"><text:span text:style-name="T2"/></text:p>
      <text:p text:style-name="P16"><text:span text:style-name="T1">-Phase VII: Sec+ Cert - Study for and getting the Sec+ cert via books, note cards, and practice exams.</text:span></text:p>
      <text:p text:style-name="P16"><text:span text:style-name="T1"/></text:p>
      <text:p text:style-name="P16"><text:span text:style-name="T1">-Phase VIII: Interview Prep &amp; Interviewing - Practicing for interviews, both via labs covering all the main OWASP classes, plus a ton of note card review and practicing behavioral / past job answers.</text:span></text:p>
      <text:p text:style-name="P16"><text:span text:style-name="T1"/></text:p>
      <text:p text:style-name="P16"><text:span text:style-name="T1">-Phase IX: First days on the job and tips on how to make the most of my first few weeks and months at the new job</text:span></text:p>
      <text:p text:style-name="P16"><text:soft-page-break/><text:span text:style-name="T1"/></text:p>
      <text:p text:style-name="P16">Study Methodology</text:p>
      <text:p text:style-name="P16"><text:span text:style-name="T1">-Mentorship - Get an AppSec mentor via MentorCruise. Have them review my study plan. Work with them throughout the plan to ensure I am heading in the right direction and that the work I am producing is good and accurate. Run mock interviews with them.</text:span></text:p>
      <text:p text:style-name="P16"><text:span text:style-name="T1"/></text:p>
      <text:p text:style-name="P16"><text:span text:style-name="T1">-Note Taking &amp; Note Cards - Take notes on everything I learn, while learning it. These notes then exist forever, for later review and reading. Convert the notes into 3"x5" note cards for memorization. </text:span></text:p>
      <text:p text:style-name="P16"><text:span text:style-name="T1"/></text:p>
      <text:p text:style-name="P16"><text:span text:style-name="T1">-Local &amp; Regional Events - Attend a lot of them. It will help me feel like part of the industry again and motivate me in my studies. As I get to know people via repeat interactions, it will build a network I can utilize during job application time. I can talk about my work, once I get further into it, too.</text:span></text:p>
      <text:p text:style-name="P16"><text:span text:style-name="T1"/></text:p>
      <text:p text:style-name="P16"><text:span text:style-name="T1">-Study Portfolio - Documented offensive work including vulnerability write-ups, lab solutions, CTF walkthroughs, threat modeling docs, and other work produced through plan. It all gets commited to github, even my notes. </text:span><text:span text:style-name="T3">Start publishing my work on LinkedIn once I get into Phase III, where the heavy OWASP work begins and study moves past just filling in gaps from dev.</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0T09:05:53.894390264</meta:creation-date>
    <dc:date>2026-07-15T08:03:03.680740219</dc:date>
    <meta:editing-duration>PT5H11M</meta:editing-duration>
    <meta:editing-cycles>110</meta:editing-cycles>
    <meta:generator>LibreOffice/24.2.7.2$Linux_X86_64 LibreOffice_project/420$Build-2</meta:generator>
    <meta:print-date>2025-05-10T11:54:09.436205656</meta:print-date>
    <meta:document-statistic meta:table-count="0" meta:image-count="1" meta:object-count="0" meta:page-count="4" meta:paragraph-count="58" meta:word-count="1275" meta:character-count="7380" meta:non-whitespace-character-count="6163"/>
  </office:meta>
</office:document-meta>
</file>
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style="normal" style:text-underline-style="none" fo:font-weight="bold" officeooo:rsid="011183ec" officeooo:paragraph-rsid="00171566"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style:text-properties fo:font-weight="bold" officeooo:rsid="0090dc01" officeooo:paragraph-rsid="0090dc01" style:font-weight-asian="bold" style:font-weight-complex="bold"/>
    </style:style>
    <style:style style:name="P3" style:family="paragraph" style:parent-style-name="Standard" style:list-style-name="L2">
      <style:paragraph-properties fo:text-align="start" style:justify-single-word="false"/>
      <style:text-properties officeooo:paragraph-rsid="0090dc01"/>
    </style:style>
    <style:style style:name="P4" style:family="paragraph" style:parent-style-name="Standard">
      <style:text-properties fo:font-size="12pt" style:text-underline-style="none" fo:font-weight="bold" officeooo:rsid="00044232" officeooo:paragraph-rsid="00171566" style:font-size-asian="12pt" style:font-weight-asian="bold" style:font-size-complex="12pt" style:font-weight-complex="bold"/>
    </style:style>
    <style:style style:name="P5" style:family="paragraph" style:parent-style-name="Standard">
      <style:text-properties fo:font-size="12pt" style:text-underline-style="none" fo:font-weight="normal" officeooo:rsid="008b0e57" officeooo:paragraph-rsid="008b0e57"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officeooo:rsid="002a3833" officeooo:paragraph-rsid="00171566" style:font-size-asian="12pt" style:font-size-complex="12pt"/>
    </style:style>
    <style:style style:name="P7" style:family="paragraph" style:parent-style-name="Standard">
      <style:paragraph-properties fo:text-align="center" style:justify-single-word="false"/>
      <style:text-properties fo:font-size="12pt" officeooo:rsid="002a3833" officeooo:paragraph-rsid="0090dc01" style:font-size-asian="12pt" style:font-size-complex="12pt"/>
    </style:style>
    <style:style style:name="P8" style:family="paragraph" style:parent-style-name="Standard">
      <style:paragraph-properties fo:text-align="start" style:justify-single-word="false"/>
      <style:text-properties fo:font-size="12pt" fo:font-weight="bold" officeooo:rsid="008f9b75" officeooo:paragraph-rsid="008f9b75"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8fe81f" officeooo:paragraph-rsid="008fe81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906054" officeooo:paragraph-rsid="00906054"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90dc01" officeooo:paragraph-rsid="0090dc01" style:font-size-asian="12pt" style:font-weight-asian="bold" style:font-size-complex="12pt" style:font-weight-complex="bold"/>
    </style:style>
    <style:style style:name="P12" style:family="paragraph" style:parent-style-name="Standard">
      <style:text-properties fo:font-size="12pt" fo:font-weight="bold" officeooo:rsid="0090dc01" officeooo:paragraph-rsid="0090dc01"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8fe81f" officeooo:paragraph-rsid="008fe81f"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16pt" style:text-underline-style="none" fo:font-weight="bold" officeooo:rsid="008f9b75" officeooo:paragraph-rsid="008f9b75"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style:text-underline-style="none" fo:font-weight="bold" officeooo:rsid="0090dc01" officeooo:paragraph-rsid="0090dc01"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weight="normal" officeooo:rsid="0090dc01" officeooo:paragraph-rsid="0090dc01" style:font-weight-asian="normal" style:font-weight-complex="normal"/>
    </style:style>
    <style:style style:name="P17" style:family="paragraph" style:parent-style-name="Standard" style:list-style-name="L2">
      <style:paragraph-properties fo:text-align="start" style:justify-single-word="false"/>
      <style:text-properties officeooo:rsid="0090dc01" officeooo:paragraph-rsid="0090dc01"/>
    </style:style>
    <style:style style:name="P18" style:family="paragraph" style:parent-style-name="Standard">
      <style:paragraph-properties fo:text-align="start" style:justify-single-word="false"/>
      <style:text-properties officeooo:rsid="0090dc01" officeooo:paragraph-rsid="0090dc01"/>
    </style:style>
    <style:style style:name="T1" style:family="text">
      <style:text-properties fo:font-weight="normal" style:font-weight-asian="normal" style:font-weight-complex="normal"/>
    </style:style>
    <style:style style:name="T2" style:family="text">
      <style:text-properties style:use-window-font-color="true" loext:opacity="0%"/>
    </style:style>
    <style:style style:name="T3" style:family="text">
      <style:text-properties style:use-window-font-color="true" loext:opacity="0%" officeooo:rsid="00317479"/>
    </style:style>
    <style:style style:name="T4" style:family="text">
      <style:text-properties style:use-window-font-color="true" loext:opacity="0%" fo:font-style="italic" style:font-style-asian="italic" style:font-style-complex="italic"/>
    </style:style>
    <style:style style:name="T5" style:family="text">
      <style:text-properties style:use-window-font-color="true" loext:opacity="0%" fo:font-style="italic" officeooo:rsid="00317479" style:font-style-asian="italic" style:font-style-complex="italic"/>
    </style:style>
    <style:style style:name="T6" style:family="text">
      <style:text-properties officeooo:rsid="0089decb"/>
    </style:style>
    <style:style style:name="T7" style:family="text">
      <style:text-properties officeooo:rsid="008b0e57"/>
    </style:style>
    <style:style style:name="T8" style:family="text">
      <style:text-properties officeooo:rsid="00906054"/>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906054" style:font-size-asian="12pt" style:font-weight-asian="normal" style:font-size-complex="12pt" style:font-weight-complex="normal"/>
    </style:style>
    <style:style style:name="T11" style:family="text">
      <style:text-properties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Intro to Cyb</text:span><text:span text:style-name="T7">ersecurity</text:span><text:line-break/></text:p>
      <text:p text:style-name="P4">Learning Sources</text:p>
      <text:p text:style-name="P5"><text:span text:style-name="T3">-</text:span><text:span text:style-name="T4">"</text:span><text:span text:style-name="T5">Application Security</text:span><text:span text:style-name="T4"> </text:span><text:span text:style-name="T5">Engineering </text:span><text:span text:style-name="T4">-</text:span><text:span text:style-name="T5"> Study Plan</text:span><text:span text:style-name="T4">"</text:span><text:span text:style-name="T2"> </text:span></text:p>
      <text:p text:style-name="P5"><text:span text:style-name="T2"/></text:p>
      <text:p text:style-name="P5"><text:span text:style-name="T2"/></text:p>
      <text:p text:style-name="P14"><text:span text:style-name="T2">Application Security</text:span></text:p>
      <text:p text:style-name="P6"/>
      <text:p text:style-name="P8">Intro to AppSec</text:p>
      <text:p text:style-name="P8"><text:span text:style-name="T1">-The discipline of finding, fixing, and preventing security vulnerabilities in software. How can this software be broken?</text:span></text:p>
      <text:p text:style-name="P8"><text:span text:style-name="T1"/></text:p>
      <text:p text:style-name="P8"><text:span text:style-name="T1">-All software has an attack surface, covering input, auth flows, bad dependencies, etc. AppSec Eng map this surface, probe it for weaknesses, and work w/ dev teams to have the weaknesses corrected.</text:span></text:p>
      <text:p text:style-name="P8"><text:span text:style-name="T1"/></text:p>
      <text:p text:style-name="P8"><text:span text:style-name="T1">-AppSec spans the full SDLC. Secure code review during dev, static analysis during testing, dynamic analysis during application execution, and manual pen testing of both static and dynamic.</text:span></text:p>
      <text:p text:style-name="P8"><text:span text:style-name="T1"/></text:p>
      <text:p text:style-name="P8"><text:span text:style-name="T1">-OWASP Top 10 highlights most critical risks, such as SQL injection and XSS. Each risk is a vulnerability class an AppSec eng knows well, as a foundation understanding of how systems fail.</text:span></text:p>
      <text:p text:style-name="P8"><text:span text:style-name="T1"/></text:p>
      <text:p text:style-name="P9">Why AppSec Eng</text:p>
      <text:p text:style-name="P13">-My past 5 years in building web applications gives me an edge up, as I already know the languages, components, and systems that AppSec Eng work with, from building them myself.</text:p>
      <text:p text:style-name="P13"/>
      <text:p text:style-name="P13">-I understand not just what vulnerabilities exist, but why dev may write them to begin with, too</text:p>
      <text:p text:style-name="P13"/>
      <text:p text:style-name="P13">-Pretty much all main tech I used at my last job, from FastAPI (REST framework), to Python, to Docker, to writing tests is relevant for the switch to cyb.</text:p>
      <text:p text:style-name="P13"/>
      <text:p text:style-name="P13">-No endless leetcode cramming, dead dev job market, and convoluted <text:span text:style-name="T8">and disorganized </text:span>interview <text:span text:style-name="T8">formats. Still practical exams during interviews, but not like in dev, which has just become ridiculous.</text:span></text:p>
      <text:p text:style-name="P13"/>
      <text:p text:style-name="P10">Why Now<text:span text:style-name="T1"><text:line-break/>-It is currently July 2026. Web dev layoffs have been running strong for 3+ years now. There are few jobs and what jobs there are have hundreds of applicants each.</text:span></text:p>
      <text:p text:style-name="P10"><text:span text:style-name="T1"/></text:p>
      <text:p text:style-name="P10"><text:span text:style-name="T1">-Cybersecurity workers, in contrast, are in high demand, and cyb as a whole (sans very basic positions) has been more resistant to AI layoffs, with AppSec postings up 12% from the prior year.<text:line-break/><text:line-break/>-USA breach costs reached a record $10.22 million in 2025 and the IBM study that revealed this showed that nearly 2/3 orgs they studied are still recovering from breaches.<text:line-break/></text:span></text:p>
      <text:p text:style-name="P10"><text:span text:style-name="T1">-More than 45% of data breaches in 2024 involved at least one app-layer vulnerability and over 60% of Fortune 500 companies now integrate AppSec testing into their SDLC.</text:span></text:p>
      <text:p text:style-name="P10"><text:span text:style-name="T1"/></text:p>
      <text:p text:style-name="P10"><text:soft-page-break/><text:span text:style-name="T1">-There is a talent shortage for AppSec and demand is growing faster than it can be filled by worker. The AppSec testing market is growing 26.7% annually, too.<text:line-break/><text:line-break/></text:span>Target Role: Application Security Engineer</text:p>
      <text:p text:style-name="P10"><text:span text:style-name="T1">-AppSec Eng shares the same domain as Soft Eng (web). HTTP, APIs, auth flows, browser sec models, DB queries, etc. Instead of building the software, AppSec scans it for sec vulnerabilities, though.</text:span></text:p>
      <text:p text:style-name="P10"><text:span text:style-name="T1"/></text:p>
      <text:p text:style-name="P10"><text:span text:style-name="T1">-How can I break it like an attacker might, versus how can I build it.</text:span></text:p>
      <text:p text:style-name="P10"><text:span text:style-name="T1"/></text:p>
      <text:p text:style-name="P11"><text:span text:style-name="T1">-Daily responsibilities include:</text:span></text:p>
      <text:list text:style-name="L2">
        <text:list-item>
          <text:p text:style-name="P3"><text:span text:style-name="T10">Secure Code Review - reading code to find vulnerabilities</text:span></text:p>
        </text:list-item>
        <text:list-item>
          <text:p text:style-name="P17"><text:span text:style-name="T10">P</text:span><text:span text:style-name="T9">en Testing / DAST - Running BURP Suite on a staging env and testing HTTP requests</text:span></text:p>
        </text:list-item>
        <text:list-item>
          <text:p text:style-name="P17"><text:span text:style-name="T9">SAST - Running and maintaining SAST tooling in CI/CD</text:span></text:p>
        </text:list-item>
        <text:list-item>
          <text:p text:style-name="P17"><text:span text:style-name="T9">Threat Modeling - of new systems and features</text:span></text:p>
        </text:list-item>
        <text:list-item>
          <text:p text:style-name="P17"><text:span text:style-name="T9">Vulnerability Reporting &amp; Remediation Tracking - involvement when vulnerabilities found</text:span></text:p>
        </text:list-item>
        <text:list-item>
          <text:p text:style-name="P17"><text:span text:style-name="T9">Sec Training &amp; Dev Education - working w/ dev teams to help improve dev side cyb practices</text:span></text:p>
        </text:list-item>
        <text:list-item>
          <text:p text:style-name="P17"><text:span text:style-name="T9">Dependency &amp; Supply Chain Sec - SCA scanning, CVE monitoring, patch prioritization</text:span></text:p>
        </text:list-item>
      </text:list>
      <text:p text:style-name="P18"><text:span text:style-name="T9"/></text:p>
      <text:p text:style-name="P2"><text:span text:style-name="T11">Compensation</text:span></text:p>
      <text:p text:style-name="P2"><text:span text:style-name="T9">-Entry roles pulling in $90k to $130k, mid roles $130k to $180k, senior $170k to $240k</text:span></text:p>
      <text:p text:style-name="P2"><text:span text:style-name="T9"/></text:p>
      <text:p text:style-name="P2"><text:span text:style-name="T11">Job Market</text:span></text:p>
      <text:p text:style-name="P16"><text:span text:style-name="T11">-Good Philly opportunities via local health tech, financial services, enterprise, and legal tech companies such as Penn Medicine, Vanguard, and Comcast</text:span></text:p>
      <text:p text:style-name="P16"><text:span text:style-name="T11"/></text:p>
      <text:p text:style-name="P16"><text:span text:style-name="T11">-A huge number of cybersecurity jobs also allow remote flexibility, meaning the DC and NYC job markets open up, plus further away remote options</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0T09:05:53.894390264</meta:creation-date>
    <dc:date>2026-07-15T07:24:46.999646764</dc:date>
    <meta:editing-duration>PT4H57M50S</meta:editing-duration>
    <meta:editing-cycles>107</meta:editing-cycles>
    <meta:generator>LibreOffice/24.2.7.2$Linux_X86_64 LibreOffice_project/420$Build-2</meta:generator>
    <meta:print-date>2025-05-10T11:54:09.436205656</meta:print-date>
    <meta:document-statistic meta:table-count="0" meta:image-count="0" meta:object-count="0" meta:page-count="2" meta:paragraph-count="33" meta:word-count="591" meta:character-count="3568" meta:non-whitespace-character-count="3012"/>
  </office:meta>
</office:document-meta>
</file>
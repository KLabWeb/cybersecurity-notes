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style:text-underline-style="none" fo:font-weight="bold" officeooo:rsid="00044232" officeooo:paragraph-rsid="0017156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officeooo:rsid="011183ec" officeooo:paragraph-rsid="00171566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text-properties style:text-underline-style="none" fo:font-weight="normal" officeooo:rsid="008b0e57" officeooo:paragraph-rsid="008b0e5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2a3833" officeooo:paragraph-rsid="00171566"/>
    </style:style>
    <style:style style:name="T1" style:family="text">
      <style:text-properties style:use-window-font-color="true" loext:opacity="0%" fo:font-size="11pt" style:font-size-asian="11pt" style:font-size-complex="11pt"/>
    </style:style>
    <style:style style:name="T2" style:family="text">
      <style:text-properties style:use-window-font-color="true" loext:opacity="0%" fo:font-size="11pt" officeooo:rsid="00317479" style:font-size-asian="11pt" style:font-size-complex="11pt"/>
    </style:style>
    <style:style style:name="T3" style:family="text">
      <style:text-properties style:use-window-font-color="true" loext:opacity="0%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loext:opacity="0%" fo:font-size="11pt" fo:font-style="italic" officeooo:rsid="00317479" style:font-size-asian="11pt" style:font-style-asian="italic" style:font-size-complex="11pt" style:font-style-complex="italic"/>
    </style:style>
    <style:style style:name="T5" style:family="text">
      <style:text-properties officeooo:rsid="0089decb"/>
    </style:style>
    <style:style style:name="T6" style:family="text">
      <style:text-properties officeooo:rsid="008b0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Intro to Cyb</text:span><text:span text:style-name="T6">ersecurity</text:span><text:line-break/></text:p>
      <text:p text:style-name="P1">Learning Sources</text:p>
      <text:p text:style-name="P3"><text:span text:style-name="T2">-</text:span><text:span text:style-name="T3">"</text:span><text:span text:style-name="T4">Application Security</text:span><text:span text:style-name="T3"> </text:span><text:span text:style-name="T4">Engineering </text:span><text:span text:style-name="T3">-</text:span><text:span text:style-name="T4"> Study Plan</text:span><text:span text:style-name="T3">"</text:span><text:span text:style-name="T1"> 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09:05:53.894390264</meta:creation-date>
    <dc:date>2026-07-15T06:44:02.922330636</dc:date>
    <meta:editing-duration>PT4H31M3S</meta:editing-duration>
    <meta:editing-cycles>104</meta:editing-cycles>
    <meta:generator>LibreOffice/24.2.7.2$Linux_X86_64 LibreOffice_project/420$Build-2</meta:generator>
    <meta:print-date>2025-05-10T11:54:09.436205656</meta:print-date>
    <meta:document-statistic meta:table-count="0" meta:image-count="0" meta:object-count="0" meta:page-count="1" meta:paragraph-count="3" meta:word-count="11" meta:character-count="88" meta:non-whitespace-character-count="78"/>
  </office:meta>
</office:document-meta>
</file>
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54b2fdf" officeooo:paragraph-rsid="054b2fdf" fo:background-color="transparent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586b7db" officeooo:paragraph-rsid="0586b7db" fo:background-color="transparent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588eb1f" officeooo:paragraph-rsid="0588eb1f" fo:background-color="transparent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bold" officeooo:rsid="0553428d" officeooo:paragraph-rsid="056bff89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553428d" officeooo:paragraph-rsid="056bff89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553428d" officeooo:paragraph-rsid="0582db61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553428d" officeooo:paragraph-rsid="057f4671" fo:background-color="transparent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553428d" officeooo:paragraph-rsid="05811edd" fo:background-color="transparent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553428d" officeooo:paragraph-rsid="0586b7db" fo:background-color="transparent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553428d" officeooo:paragraph-rsid="058ce333" fo:background-color="transparent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553428d" officeooo:paragraph-rsid="0593e77d" fo:background-color="transparent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553428d" officeooo:paragraph-rsid="05954174" fo:background-color="transparent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bold" officeooo:rsid="0553428d" officeooo:paragraph-rsid="0596d2af" fo:background-color="transparent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weight="bold" officeooo:rsid="054b2fdf" officeooo:paragraph-rsid="054b2fdf" fo:background-color="transparent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weight="bold" officeooo:rsid="054b2fdf" officeooo:paragraph-rsid="0586b7db" fo:background-color="transparent" style:font-weight-asian="bold" style:font-weight-complex="bold"/>
    </style:style>
    <style:style style:name="P16" style:family="paragraph" style:parent-style-name="Standard">
      <style:paragraph-properties fo:text-align="center" style:justify-single-word="false">
        <style:tab-stops/>
      </style:paragraph-properties>
      <style:text-properties style:text-underline-style="solid" style:text-underline-width="auto" style:text-underline-color="font-color" fo:font-weight="bold" officeooo:rsid="001fc81d" officeooo:paragraph-rsid="001fc81d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officeooo:paragraph-rsid="001fc81d"/>
    </style:style>
    <style:style style:name="P18" style:family="paragraph" style:parent-style-name="Standard">
      <style:paragraph-properties fo:text-align="center" style:justify-single-word="false"/>
      <style:text-properties fo:color="#c9211e" loext:opacity="100%" fo:font-weight="bold" officeooo:rsid="0586b7db" officeooo:paragraph-rsid="0586b7db" fo:background-color="transparent" style:font-weight-asian="bold" style:font-weight-complex="bold"/>
    </style:style>
    <style:style style:name="T1" style:family="text">
      <style:text-properties fo:font-weight="bold" officeooo:rsid="03848245" fo:background-color="transparent" loext:char-shading-value="0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54b2fdf" fo:background-color="transparent" loext:char-shading-value="0"/>
    </style:style>
    <style:style style:name="T4" style:family="text">
      <style:text-properties style:text-underline-style="solid" style:text-underline-width="auto" style:text-underline-color="font-color" officeooo:rsid="056bff89" fo:background-color="transparent" loext:char-shading-value="0"/>
    </style:style>
    <style:style style:name="T5" style:family="text">
      <style:text-properties style:text-underline-style="solid" style:text-underline-width="auto" style:text-underline-color="font-color" officeooo:rsid="057cf025"/>
    </style:style>
    <style:style style:name="T6" style:family="text">
      <style:text-properties style:text-underline-style="solid" style:text-underline-width="auto" style:text-underline-color="font-color" officeooo:rsid="054b2fdf"/>
    </style:style>
    <style:style style:name="T7" style:family="text">
      <style:text-properties style:text-underline-style="solid" style:text-underline-width="auto" style:text-underline-color="font-color" officeooo:rsid="056bff89"/>
    </style:style>
    <style:style style:name="T8" style:family="text">
      <style:text-properties style:text-underline-style="solid" style:text-underline-width="auto" style:text-underline-color="font-color" officeooo:rsid="0582db61"/>
    </style:style>
    <style:style style:name="T9" style:family="text">
      <style:text-properties style:text-underline-style="solid" style:text-underline-width="auto" style:text-underline-color="font-color" officeooo:rsid="0586b7db"/>
    </style:style>
    <style:style style:name="T10" style:family="text">
      <style:text-properties style:text-underline-style="solid" style:text-underline-width="auto" style:text-underline-color="font-color" officeooo:rsid="057f4671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fo:font-weight="normal" fo:background-color="transparent" loext:char-shading-value="0" style:font-weight-asian="normal" style:font-weight-complex="normal"/>
    </style:style>
    <style:style style:name="T13" style:family="text">
      <style:text-properties style:text-underline-style="none" fo:font-weight="normal" officeooo:rsid="055a6c62" fo:background-color="transparent" loext:char-shading-value="0" style:font-weight-asian="normal" style:font-weight-complex="normal"/>
    </style:style>
    <style:style style:name="T14" style:family="text">
      <style:text-properties style:text-underline-style="none" fo:font-weight="normal" officeooo:rsid="055b5ccb" fo:background-color="transparent" loext:char-shading-value="0" style:font-weight-asian="normal" style:font-weight-complex="normal"/>
    </style:style>
    <style:style style:name="T15" style:family="text">
      <style:text-properties style:text-underline-style="none" fo:font-weight="normal" officeooo:rsid="055ce26b" fo:background-color="transparent" loext:char-shading-value="0" style:font-weight-asian="normal" style:font-weight-complex="normal"/>
    </style:style>
    <style:style style:name="T16" style:family="text">
      <style:text-properties style:text-underline-style="none" fo:font-weight="normal" officeooo:rsid="055dbc82" fo:background-color="transparent" loext:char-shading-value="0" style:font-weight-asian="normal" style:font-weight-complex="normal"/>
    </style:style>
    <style:style style:name="T17" style:family="text">
      <style:text-properties style:text-underline-style="none" fo:font-weight="normal" officeooo:rsid="055f41eb" fo:background-color="transparent" loext:char-shading-value="0" style:font-weight-asian="normal" style:font-weight-complex="normal"/>
    </style:style>
    <style:style style:name="T18" style:family="text">
      <style:text-properties style:text-underline-style="none" fo:font-weight="normal" officeooo:rsid="055fde65" fo:background-color="transparent" loext:char-shading-value="0" style:font-weight-asian="normal" style:font-weight-complex="normal"/>
    </style:style>
    <style:style style:name="T19" style:family="text">
      <style:text-properties style:text-underline-style="none" fo:font-weight="normal" officeooo:rsid="056189f4" fo:background-color="transparent" loext:char-shading-value="0" style:font-weight-asian="normal" style:font-weight-complex="normal"/>
    </style:style>
    <style:style style:name="T20" style:family="text">
      <style:text-properties style:text-underline-style="none" fo:font-weight="normal" officeooo:rsid="0562b9b2" fo:background-color="transparent" loext:char-shading-value="0" style:font-weight-asian="normal" style:font-weight-complex="normal"/>
    </style:style>
    <style:style style:name="T21" style:family="text">
      <style:text-properties style:text-underline-style="none" fo:font-weight="normal" officeooo:rsid="0562c49c" fo:background-color="transparent" loext:char-shading-value="0" style:font-weight-asian="normal" style:font-weight-complex="normal"/>
    </style:style>
    <style:style style:name="T22" style:family="text">
      <style:text-properties style:text-underline-style="none" fo:font-weight="normal" officeooo:rsid="05636588" fo:background-color="transparent" loext:char-shading-value="0" style:font-weight-asian="normal" style:font-weight-complex="normal"/>
    </style:style>
    <style:style style:name="T23" style:family="text">
      <style:text-properties style:text-underline-style="none" fo:font-weight="normal" officeooo:rsid="05643857" fo:background-color="transparent" loext:char-shading-value="0" style:font-weight-asian="normal" style:font-weight-complex="normal"/>
    </style:style>
    <style:style style:name="T24" style:family="text">
      <style:text-properties style:text-underline-style="none" fo:font-weight="normal" officeooo:rsid="0565ef51" fo:background-color="transparent" loext:char-shading-value="0" style:font-weight-asian="normal" style:font-weight-complex="normal"/>
    </style:style>
    <style:style style:name="T25" style:family="text">
      <style:text-properties style:text-underline-style="none" fo:font-weight="normal" officeooo:rsid="0565fa69" fo:background-color="transparent" loext:char-shading-value="0" style:font-weight-asian="normal" style:font-weight-complex="normal"/>
    </style:style>
    <style:style style:name="T26" style:family="text">
      <style:text-properties style:text-underline-style="none" fo:font-weight="normal" officeooo:rsid="056bd97a" fo:background-color="transparent" loext:char-shading-value="0" style:font-weight-asian="normal" style:font-weight-complex="normal"/>
    </style:style>
    <style:style style:name="T27" style:family="text">
      <style:text-properties style:text-underline-style="none" fo:font-weight="normal" officeooo:rsid="054b2fdf" fo:background-color="transparent" loext:char-shading-value="0" style:font-weight-asian="normal" style:font-weight-complex="normal"/>
    </style:style>
    <style:style style:name="T28" style:family="text">
      <style:text-properties style:text-underline-style="none" fo:font-weight="normal" officeooo:rsid="056bff89" fo:background-color="transparent" loext:char-shading-value="0" style:font-weight-asian="normal" style:font-weight-complex="normal"/>
    </style:style>
    <style:style style:name="T29" style:family="text">
      <style:text-properties style:text-underline-style="none" fo:font-weight="normal" officeooo:rsid="056dab49" fo:background-color="transparent" loext:char-shading-value="0" style:font-weight-asian="normal" style:font-weight-complex="normal"/>
    </style:style>
    <style:style style:name="T30" style:family="text">
      <style:text-properties style:text-underline-style="none" fo:font-weight="normal" officeooo:rsid="05636588" style:font-weight-asian="normal" style:font-weight-complex="normal"/>
    </style:style>
    <style:style style:name="T31" style:family="text">
      <style:text-properties style:text-underline-style="none" fo:font-weight="normal" officeooo:rsid="0565ef51" style:font-weight-asian="normal" style:font-weight-complex="normal"/>
    </style:style>
    <style:style style:name="T32" style:family="text">
      <style:text-properties style:text-underline-style="none" fo:font-weight="normal" officeooo:rsid="0565fa69" style:font-weight-asian="normal" style:font-weight-complex="normal"/>
    </style:style>
    <style:style style:name="T33" style:family="text">
      <style:text-properties style:text-underline-style="none" fo:font-weight="normal" officeooo:rsid="055fde65" style:font-weight-asian="normal" style:font-weight-complex="normal"/>
    </style:style>
    <style:style style:name="T34" style:family="text">
      <style:text-properties style:text-underline-style="none" fo:font-weight="normal" officeooo:rsid="055f41eb" style:font-weight-asian="normal" style:font-weight-complex="normal"/>
    </style:style>
    <style:style style:name="T35" style:family="text">
      <style:text-properties style:text-underline-style="none" fo:font-weight="normal" officeooo:rsid="055ce26b" style:font-weight-asian="normal" style:font-weight-complex="normal"/>
    </style:style>
    <style:style style:name="T36" style:family="text">
      <style:text-properties style:text-underline-style="none" fo:font-weight="normal" officeooo:rsid="05660bf0" style:font-weight-asian="normal" style:font-weight-complex="normal"/>
    </style:style>
    <style:style style:name="T37" style:family="text">
      <style:text-properties style:text-underline-style="none" fo:font-weight="normal" officeooo:rsid="056964a8" style:font-weight-asian="normal" style:font-weight-complex="normal"/>
    </style:style>
    <style:style style:name="T38" style:family="text">
      <style:text-properties style:text-underline-style="none" fo:font-weight="normal" officeooo:rsid="056a13e9" style:font-weight-asian="normal" style:font-weight-complex="normal"/>
    </style:style>
    <style:style style:name="T39" style:family="text">
      <style:text-properties style:text-underline-style="none" fo:font-weight="normal" officeooo:rsid="056a41f3" style:font-weight-asian="normal" style:font-weight-complex="normal"/>
    </style:style>
    <style:style style:name="T40" style:family="text">
      <style:text-properties style:text-underline-style="none" fo:font-weight="normal" officeooo:rsid="056bd97a" style:font-weight-asian="normal" style:font-weight-complex="normal"/>
    </style:style>
    <style:style style:name="T41" style:family="text">
      <style:text-properties style:text-underline-style="none" fo:font-weight="normal" officeooo:rsid="05721e86" style:font-weight-asian="normal" style:font-weight-complex="normal"/>
    </style:style>
    <style:style style:name="T42" style:family="text">
      <style:text-properties style:text-underline-style="none" fo:font-weight="normal" officeooo:rsid="05751499" style:font-weight-asian="normal" style:font-weight-complex="normal"/>
    </style:style>
    <style:style style:name="T43" style:family="text">
      <style:text-properties style:text-underline-style="none" fo:font-weight="normal" officeooo:rsid="05763355" style:font-weight-asian="normal" style:font-weight-complex="normal"/>
    </style:style>
    <style:style style:name="T44" style:family="text">
      <style:text-properties style:text-underline-style="none" fo:font-weight="normal" officeooo:rsid="05777349" style:font-weight-asian="normal" style:font-weight-complex="normal"/>
    </style:style>
    <style:style style:name="T45" style:family="text">
      <style:text-properties style:text-underline-style="none" fo:font-weight="normal" officeooo:rsid="0577a91e" style:font-weight-asian="normal" style:font-weight-complex="normal"/>
    </style:style>
    <style:style style:name="T46" style:family="text">
      <style:text-properties style:text-underline-style="none" fo:font-weight="normal" officeooo:rsid="057a3a59" style:font-weight-asian="normal" style:font-weight-complex="normal"/>
    </style:style>
    <style:style style:name="T47" style:family="text">
      <style:text-properties style:text-underline-style="none" fo:font-weight="normal" officeooo:rsid="057f84bf" style:font-weight-asian="normal" style:font-weight-complex="normal"/>
    </style:style>
    <style:style style:name="T48" style:family="text">
      <style:text-properties style:text-underline-style="none" fo:font-weight="normal" officeooo:rsid="057fd123" style:font-weight-asian="normal" style:font-weight-complex="normal"/>
    </style:style>
    <style:style style:name="T49" style:family="text">
      <style:text-properties style:text-underline-style="none" fo:font-weight="normal" officeooo:rsid="05811edd" style:font-weight-asian="normal" style:font-weight-complex="normal"/>
    </style:style>
    <style:style style:name="T50" style:family="text">
      <style:text-properties style:text-underline-style="none" fo:font-weight="normal" officeooo:rsid="0581c982" style:font-weight-asian="normal" style:font-weight-complex="normal"/>
    </style:style>
    <style:style style:name="T51" style:family="text">
      <style:text-properties style:text-underline-style="none" fo:font-weight="normal" officeooo:rsid="05835aa2" style:font-weight-asian="normal" style:font-weight-complex="normal"/>
    </style:style>
    <style:style style:name="T52" style:family="text">
      <style:text-properties style:text-underline-style="none" fo:font-weight="normal" officeooo:rsid="0583ee28" style:font-weight-asian="normal" style:font-weight-complex="normal"/>
    </style:style>
    <style:style style:name="T53" style:family="text">
      <style:text-properties style:text-underline-style="none" fo:font-weight="normal" officeooo:rsid="0584a391" style:font-weight-asian="normal" style:font-weight-complex="normal"/>
    </style:style>
    <style:style style:name="T54" style:family="text">
      <style:text-properties style:text-underline-style="none" fo:font-weight="normal" officeooo:rsid="058e2531" style:font-weight-asian="normal" style:font-weight-complex="normal"/>
    </style:style>
    <style:style style:name="T55" style:family="text">
      <style:text-properties style:text-underline-style="none" fo:font-weight="normal" officeooo:rsid="05919352" style:font-weight-asian="normal" style:font-weight-complex="normal"/>
    </style:style>
    <style:style style:name="T56" style:family="text">
      <style:text-properties style:text-underline-style="none" fo:font-weight="normal" officeooo:rsid="059293d9" style:font-weight-asian="normal" style:font-weight-complex="normal"/>
    </style:style>
    <style:style style:name="T57" style:family="text">
      <style:text-properties style:text-underline-style="none" fo:font-weight="normal" officeooo:rsid="0593e77d" style:font-weight-asian="normal" style:font-weight-complex="normal"/>
    </style:style>
    <style:style style:name="T58" style:family="text">
      <style:text-properties style:text-underline-style="none" fo:font-weight="normal" officeooo:rsid="05960b4e" style:font-weight-asian="normal" style:font-weight-complex="normal"/>
    </style:style>
    <style:style style:name="T59" style:family="text">
      <style:text-properties style:text-underline-style="none" fo:font-weight="normal" officeooo:rsid="0596d2af" style:font-weight-asian="normal" style:font-weight-complex="normal"/>
    </style:style>
    <style:style style:name="T60" style:family="text">
      <style:text-properties style:text-underline-style="none" fo:font-weight="normal" officeooo:rsid="0597638c" style:font-weight-asian="normal" style:font-weight-complex="normal"/>
    </style:style>
    <style:style style:name="T61" style:family="text">
      <style:text-properties style:text-underline-style="none" fo:font-weight="normal" officeooo:rsid="0599adee" style:font-weight-asian="normal" style:font-weight-complex="normal"/>
    </style:style>
    <style:style style:name="T62" style:family="text">
      <style:text-properties style:text-underline-style="none" fo:font-weight="normal" officeooo:rsid="059a03cf" style:font-weight-asian="normal" style:font-weight-complex="normal"/>
    </style:style>
    <style:style style:name="T63" style:family="text">
      <style:text-properties style:text-underline-style="none" officeooo:rsid="054b2fdf" fo:background-color="transparent" loext:char-shading-value="0"/>
    </style:style>
    <style:style style:name="T64" style:family="text">
      <style:text-properties style:text-underline-style="none" officeooo:rsid="055a6c62" fo:background-color="transparent" loext:char-shading-value="0"/>
    </style:style>
    <style:style style:name="T65" style:family="text">
      <style:text-properties style:text-underline-style="none" officeooo:rsid="056bff89" fo:background-color="transparent" loext:char-shading-value="0"/>
    </style:style>
    <style:style style:name="T66" style:family="text">
      <style:text-properties style:text-underline-style="none" officeooo:rsid="0570d5fa" fo:background-color="transparent" loext:char-shading-value="0"/>
    </style:style>
    <style:style style:name="T67" style:family="text">
      <style:text-properties style:text-underline-style="none" officeooo:rsid="054b2fdf"/>
    </style:style>
    <style:style style:name="T68" style:family="text">
      <style:text-properties style:text-underline-style="none" officeooo:rsid="055a6c62"/>
    </style:style>
    <style:style style:name="T69" style:family="text">
      <style:text-properties style:text-underline-style="none" officeooo:rsid="055ce26b"/>
    </style:style>
    <style:style style:name="T70" style:family="text">
      <style:text-properties style:text-underline-style="none" officeooo:rsid="05660bf0"/>
    </style:style>
    <style:style style:name="T71" style:family="text">
      <style:text-properties style:text-underline-style="none" officeooo:rsid="056964a8"/>
    </style:style>
    <style:style style:name="T72" style:family="text">
      <style:text-properties style:text-underline-style="none" officeooo:rsid="056a41f3"/>
    </style:style>
    <style:style style:name="T73" style:family="text">
      <style:text-properties style:text-underline-style="none" officeooo:rsid="05721e86"/>
    </style:style>
    <style:style style:name="T74" style:family="text">
      <style:text-properties style:text-underline-style="none" officeooo:rsid="05763355"/>
    </style:style>
    <style:style style:name="T75" style:family="text">
      <style:text-properties style:text-underline-style="none" officeooo:rsid="057b5c2e"/>
    </style:style>
    <style:style style:name="T76" style:family="text">
      <style:text-properties style:text-underline-style="none" officeooo:rsid="057f4671"/>
    </style:style>
    <style:style style:name="T77" style:family="text">
      <style:text-properties style:text-underline-style="none" officeooo:rsid="0582db61"/>
    </style:style>
    <style:style style:name="T78" style:family="text">
      <style:text-properties style:text-underline-style="none" officeooo:rsid="0583ee28"/>
    </style:style>
    <style:style style:name="T79" style:family="text">
      <style:text-properties style:text-underline-style="none" officeooo:rsid="0586b7db"/>
    </style:style>
    <style:style style:name="T80" style:family="text">
      <style:text-properties style:text-underline-style="none" officeooo:rsid="0588eb1f"/>
    </style:style>
    <style:style style:name="T81" style:family="text">
      <style:text-properties style:text-underline-style="none" officeooo:rsid="05890f07"/>
    </style:style>
    <style:style style:name="T82" style:family="text">
      <style:text-properties style:text-underline-style="none" officeooo:rsid="058b74a8"/>
    </style:style>
    <style:style style:name="T83" style:family="text">
      <style:text-properties style:text-underline-style="none" officeooo:rsid="058ce333"/>
    </style:style>
    <style:style style:name="T84" style:family="text">
      <style:text-properties style:text-underline-style="none" officeooo:rsid="058fc850"/>
    </style:style>
    <style:style style:name="T85" style:family="text">
      <style:text-properties style:text-underline-style="none" officeooo:rsid="059293d9"/>
    </style:style>
    <style:style style:name="T86" style:family="text">
      <style:text-properties style:text-underline-style="none" officeooo:rsid="05954174"/>
    </style:style>
    <style:style style:name="T87" style:family="text">
      <style:text-properties style:text-underline-style="none" officeooo:rsid="05990bc4"/>
    </style:style>
    <style:style style:name="T88" style:family="text">
      <style:text-properties officeooo:rsid="05225662"/>
    </style:style>
    <style:style style:name="T89" style:family="text">
      <style:text-properties officeooo:rsid="05233b67"/>
    </style:style>
    <style:style style:name="T90" style:family="text">
      <style:text-properties officeooo:rsid="055a6c62"/>
    </style:style>
    <style:style style:name="T91" style:family="text">
      <style:text-properties officeooo:rsid="0582db61"/>
    </style:style>
    <style:style style:name="T92" style:family="text">
      <style:text-properties officeooo:rsid="0586b7d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89">20</text:span><text:span text:style-name="T88">26</text:span> <text:span text:style-name="T90">Cybersecurity - AppSec Eng -</text:span> Study Plans</text:p>
      <text:p text:style-name="P17"><text:span text:style-name="T1"/></text:p>
      <text:p text:style-name="P15">Week <text:span text:style-name="T90">0</text:span><text:span text:style-name="T92">3</text:span> - <text:span text:style-name="T2">hours</text:span><text:span text:style-name="T11">, </text:span><text:span text:style-name="T2">mins</text:span><text:span text:style-name="T11"> over </text:span><text:span text:style-name="T2">da</text:span><text:span text:style-name="T9">ys</text:span></text:p>
      <text:p text:style-name="P10"><text:span text:style-name="T68"/></text:p>
      <text:p text:style-name="P12"><text:span text:style-name="T86">07/15/2026, Wed - </text:span><text:span text:style-name="T87">2 </text:span><text:span text:style-name="T86">hrs, </text:span><text:span text:style-name="T87">10 </text:span><text:span text:style-name="T86">mins</text:span></text:p>
      <text:p text:style-name="P13"><text:span text:style-name="T57">-Final edit checks of Cyb Study Plan, as performed by Claude - </text:span><text:span text:style-name="T58">15 mins</text:span></text:p>
      <text:p text:style-name="P13"><text:span text:style-name="T59">-Read through start of Cyb Study Plan &amp; create/edit "Intro to Cybersecurity" notes - 1 hr, 5</text:span><text:span text:style-name="T60">5</text:span><text:span text:style-name="T59"> mins<text:line-break/></text:span><text:span text:style-name="T61">-</text:span><text:span text:style-name="T62">Create GitHub profile README for cyb, then create notes and study guide repos - </text:span><text:span text:style-name="T79"><text:line-break/><text:line-break/>07</text:span><text:span text:style-name="T11">/</text:span><text:span text:style-name="T79">1</text:span><text:span text:style-name="T83">4</text:span><text:span text:style-name="T11">/2026, </text:span><text:span text:style-name="T83">Tue</text:span><text:span text:style-name="T68"> </text:span><text:span text:style-name="T11">- </text:span><text:span text:style-name="T85">7</text:span><text:span text:style-name="T84"> </text:span><text:span text:style-name="T76">hrs,</text:span><text:span text:style-name="T85"> 0</text:span><text:span text:style-name="T84"> </text:span><text:span text:style-name="T76">mins</text:span></text:p>
      <text:p text:style-name="P11"><text:span text:style-name="T45">-</text:span><text:span text:style-name="T40">Edit Cyb Study Plan w/ Claude</text:span><text:span text:style-name="T44"> (</text:span><text:span text:style-name="T54">page 45 </text:span><text:span text:style-name="T44">through page </text:span><text:span text:style-name="T51">4</text:span><text:span text:style-name="T54">8</text:span><text:span text:style-name="T44">)</text:span><text:span text:style-name="T45"> </text:span><text:span text:style-name="T46">-</text:span><text:span text:style-name="T47"> </text:span><text:span text:style-name="T52">3 hrs, 1</text:span><text:span text:style-name="T54">2</text:span><text:span text:style-name="T52"> </text:span><text:span text:style-name="T50">mins<text:line-break/></text:span><text:span text:style-name="T55">-FINISH edit of Cyb Study Plan w/ Claude (entire doc now validated by me) - <text:s/></text:span><text:span text:style-name="T56">3 hrs, 48 mins</text:span><text:span text:style-name="T68"><text:line-break/><text:line-break/></text:span><text:span text:style-name="T79">07</text:span><text:span text:style-name="T11">/</text:span><text:span text:style-name="T79">13</text:span><text:span text:style-name="T11">/2026, </text:span><text:span text:style-name="T76">Mon</text:span><text:span text:style-name="T68"> </text:span><text:span text:style-name="T11">- </text:span><text:span text:style-name="T82">6</text:span><text:span text:style-name="T80"> </text:span><text:span text:style-name="T76">hrs, </text:span><text:span text:style-name="T82">47</text:span><text:span text:style-name="T80"> </text:span><text:span text:style-name="T76">mins</text:span></text:p>
      <text:p text:style-name="P2"><text:span text:style-name="T76">-</text:span><text:span text:style-name="T80">Have second Claude review existing study plan + changes in main Claude - 3 hrs, 45 mins</text:span></text:p>
      <text:p text:style-name="P3"><text:span text:style-name="T80">-</text:span><text:span text:style-name="T81">Claude: "velocity accuracy" analysis based on web dev study site w/ minor time mods - </text:span><text:span text:style-name="T82">3 </text:span><text:span text:style-name="T81">hrs, </text:span><text:span text:style-name="T82">2 </text:span><text:span text:style-name="T81">mins</text:span></text:p>
      <text:p text:style-name="P9"><text:span text:style-name="T76"/></text:p>
      <text:p text:style-name="P18"><text:span text:style-name="T10">1</text:span><text:span text:style-name="T2">3 DAYS NO STUDY</text:span></text:p>
      <text:p text:style-name="P1"/>
      <text:p text:style-name="P1">Week <text:span text:style-name="T90">0</text:span><text:span text:style-name="T91">2</text:span> - <text:span text:style-name="T5">6 </text:span><text:span text:style-name="T2">hours</text:span><text:span text:style-name="T11">, </text:span><text:span text:style-name="T9">20 </text:span><text:span text:style-name="T2">mins</text:span><text:span text:style-name="T11"> over </text:span><text:span text:style-name="T79">1</text:span><text:span text:style-name="T5"> </text:span><text:span text:style-name="T2">day</text:span></text:p>
      <text:p text:style-name="P8"><text:span text:style-name="T68"><text:line-break/> 06</text:span><text:span text:style-name="T11">/</text:span><text:span text:style-name="T68">2</text:span><text:span text:style-name="T76">9</text:span><text:span text:style-name="T11">/2026, </text:span><text:span text:style-name="T76">Mon</text:span><text:span text:style-name="T68"> </text:span><text:span text:style-name="T11">- </text:span><text:span text:style-name="T78">6 </text:span><text:span text:style-name="T76">hrs, </text:span><text:span text:style-name="T78">20 </text:span><text:span text:style-name="T76">mins</text:span><text:span text:style-name="T11"><text:line-break/></text:span><text:span text:style-name="T45">-</text:span><text:span text:style-name="T40">Edit Cyb Study Plan w/ Claude</text:span><text:span text:style-name="T44"> (through page </text:span><text:span text:style-name="T49">31</text:span><text:span text:style-name="T44">)</text:span><text:span text:style-name="T45"> </text:span><text:span text:style-name="T46">-</text:span><text:span text:style-name="T47"> </text:span><text:span text:style-name="T48">2 hrs, 59 mins<text:line-break/></text:span><text:span text:style-name="T45">-</text:span><text:span text:style-name="T40">Edit Cyb Study Plan w/ Claude</text:span><text:span text:style-name="T44"> (through page </text:span><text:span text:style-name="T51">4</text:span><text:span text:style-name="T53">4</text:span><text:span text:style-name="T44">)</text:span><text:span text:style-name="T45"> </text:span><text:span text:style-name="T46">-</text:span><text:span text:style-name="T47"> </text:span><text:span text:style-name="T52">3 hrs, 21 </text:span><text:span text:style-name="T50">mins</text:span></text:p>
      <text:p text:style-name="P8"><text:span text:style-name="T50"/></text:p>
      <text:p text:style-name="P6"><text:span text:style-name="T67">Week </text:span><text:span text:style-name="T68">0</text:span><text:span text:style-name="T77">1</text:span><text:span text:style-name="T67"> - </text:span><text:span text:style-name="T8">16 </text:span><text:span text:style-name="T6">hours</text:span><text:span text:style-name="T77">,</text:span><text:span text:style-name="T67"> </text:span><text:span text:style-name="T8">44 mins</text:span><text:span text:style-name="T77"> </text:span><text:span text:style-name="T67">over </text:span><text:span text:style-name="T7">21 </text:span><text:span text:style-name="T6">days</text:span></text:p>
      <text:p text:style-name="P7"><text:span text:style-name="T68"/></text:p>
      <text:p text:style-name="P7"><text:span text:style-name="T68">06</text:span><text:span text:style-name="T11">/</text:span><text:span text:style-name="T68">2</text:span><text:span text:style-name="T74">6</text:span><text:span text:style-name="T11">/2026, </text:span><text:span text:style-name="T74">Fri</text:span><text:span text:style-name="T68"> </text:span><text:span text:style-name="T11">- </text:span><text:span text:style-name="T75">5</text:span><text:span text:style-name="T72"> </text:span><text:span text:style-name="T11">hrs,</text:span><text:span text:style-name="T75"> 53</text:span><text:span text:style-name="T72"> </text:span><text:span text:style-name="T11">mins<text:line-break/></text:span><text:span text:style-name="T45">-</text:span><text:span text:style-name="T40">Edit Cyb Study Plan w/ Claude</text:span><text:span text:style-name="T44"> (through page </text:span><text:span text:style-name="T46">30</text:span><text:span text:style-name="T44">)</text:span><text:span text:style-name="T45"> </text:span><text:span text:style-name="T46">- 3 hrs, 53 </text:span><text:span text:style-name="T45">mins</text:span><text:span text:style-name="T68"><text:line-break/></text:span><text:span text:style-name="T40">-Edit Cyb Study Plan w/ Claude</text:span><text:span text:style-name="T44"> (through page 25)</text:span><text:span text:style-name="T40"> - </text:span><text:span text:style-name="T41">2 hrs, </text:span><text:span text:style-name="T43">0</text:span><text:span text:style-name="T41"> mins</text:span><text:span text:style-name="T68"><text:line-break/><text:line-break/>06</text:span><text:span text:style-name="T11">/</text:span><text:span text:style-name="T68">2</text:span><text:span text:style-name="T70">5</text:span><text:span text:style-name="T11">/2026, </text:span><text:span text:style-name="T70">Thu</text:span><text:span text:style-name="T68"> </text:span><text:span text:style-name="T11">- </text:span><text:span text:style-name="T73">6</text:span><text:span text:style-name="T72"> </text:span><text:span text:style-name="T11">hrs, </text:span><text:span text:style-name="T73">43</text:span><text:span text:style-name="T72"> </text:span><text:span text:style-name="T11">mins</text:span><text:span text:style-name="T68"><text:line-break/></text:span><text:span text:style-name="T40">-Edit Cyb Study Plan w/ Claude</text:span><text:span text:style-name="T44"> (through page 20)</text:span><text:span text:style-name="T40"> - </text:span><text:span text:style-name="T41">2 hrs, 8 mins<text:line-break/></text:span><text:span text:style-name="T42">-Dentist appointment @ 12:30pm that lasted a long time - 0 mins</text:span><text:span text:style-name="T68"><text:line-break/></text:span><text:span text:style-name="T30">-</text:span><text:span text:style-name="T31">Re-construct Claude Study </text:span><text:span text:style-name="T40">Plan</text:span><text:span text:style-name="T31"> PDF build</text:span><text:span text:style-name="T38">, then</text:span><text:span text:style-name="T37"> edit PDF</text:span><text:span text:style-name="T32"> w/ Claude </text:span><text:span text:style-name="T37">'til</text:span><text:span text:style-name="T33"> </text:span><text:span text:style-name="T34">token max</text:span><text:span text:style-name="T35"> </text:span><text:span text:style-name="T31"><text:s/>- </text:span><text:span text:style-name="T39">4</text:span><text:span text:style-name="T38"> hrs, </text:span><text:span text:style-name="T36">3</text:span><text:span text:style-name="T38">5 </text:span><text:span text:style-name="T32">mins</text:span><text:span text:style-name="T68"><text:line-break/><text:line-break/>06</text:span><text:span text:style-name="T11">/</text:span><text:span text:style-name="T68">24</text:span><text:span text:style-name="T11">/2026, </text:span><text:span text:style-name="T68">Weds </text:span><text:span text:style-name="T11">- </text:span><text:span text:style-name="T71">4</text:span><text:span text:style-name="T69"> </text:span><text:span text:style-name="T11">hrs, </text:span><text:span text:style-name="T71">8</text:span><text:span text:style-name="T68"> </text:span><text:span text:style-name="T11">mins</text:span></text:p>
      <text:p text:style-name="P4"><text:span text:style-name="T12">-</text:span><text:span text:style-name="T13">Create new cyb study tracker doc - 5 mins<text:line-break/>-</text:span><text:span text:style-name="T14">Edit cybersecurity </text:span><text:span text:style-name="T15">study </text:span><text:span text:style-name="T26">plan</text:span><text:span text:style-name="T15"> w/ Claude</text:span><text:span text:style-name="T17"> </text:span><text:span text:style-name="T18">until </text:span><text:span text:style-name="T17">tokens maxed</text:span><text:span text:style-name="T19"> out</text:span><text:span text:style-name="T15"> - 1 hr, </text:span><text:span text:style-name="T16">42</text:span><text:span text:style-name="T15"> mins<text:line-break/></text:span><text:span text:style-name="T20">-Plan out study </text:span><text:span text:style-name="T22">w/</text:span><text:span text:style-name="T20"> UE</text:span><text:span text:style-name="T22"> schedule</text:span><text:span text:style-name="T20"> better + made formal </text:span><text:span text:style-name="T22">"wall" </text:span><text:span text:style-name="T23">schedule/split </text:span><text:span text:style-name="T20">note</text:span><text:span text:style-name="T22"> </text:span><text:span text:style-name="T20">card -</text:span><text:span text:style-name="T21"> 1 hr, 26 mins<text:line-break/></text:span><text:span text:style-name="T22">-</text:span><text:span text:style-name="T24">Re-construct Claude Study </text:span><text:span text:style-name="T26">Plan</text:span><text:span text:style-name="T24"> PDF build files</text:span><text:span text:style-name="T25"> w/ Claude </text:span><text:span text:style-name="T18">until </text:span><text:span text:style-name="T17">tokens maxed</text:span><text:span text:style-name="T19"> out</text:span><text:span text:style-name="T15"> </text:span><text:span text:style-name="T24"><text:s/>- </text:span><text:span text:style-name="T25">55 mins<text:line-break/></text:span></text:p>
      <text:p text:style-name="P5"><text:span text:style-name="T63">Week </text:span><text:span text:style-name="T64">0</text:span><text:span text:style-name="T65">0</text:span><text:span text:style-name="T63"> - </text:span><text:span text:style-name="T66">40</text:span><text:span text:style-name="T65"> </text:span><text:span text:style-name="T3">hours</text:span><text:span text:style-name="T63"> over </text:span><text:span text:style-name="T4">21 </text:span><text:span text:style-name="T3">days</text:span></text:p>
      <text:p text:style-name="P4"><text:span text:style-name="T65">May 2026</text:span></text:p>
      <text:p text:style-name="P4"><text:span text:style-name="T27">-</text:span><text:span text:style-name="T28">About 3 weeks working on the AI + Cyb Study plans, plus talks w/ Koz in Chicago and Principal AI Engineer through MentorCruise</text:span><text:span text:style-name="T29"> - 60 hour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text-line-through-style="none" style:text-line-through-typ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" style:display-name="ListLabel 1" style:family="text">
      <style:text-properties style:text-line-through-style="none" style:text-line-through-type="none"/>
    </style:style>
    <style:style style:name="ListLabel_20_2" style:display-name="ListLabel 2" style:family="text">
      <style:text-properties style:text-line-through-style="none" style:text-line-through-type="none"/>
    </style:style>
    <style:style style:name="ListLabel_20_3" style:display-name="ListLabel 3" style:family="text">
      <style:text-properties style:text-line-through-style="none" style:text-line-through-type="none"/>
    </style:style>
    <style:style style:name="ListLabel_20_4" style:display-name="ListLabel 4" style:family="text">
      <style:text-properties style:text-line-through-style="none" style:text-line-through-type="none"/>
    </style:style>
    <style:style style:name="ListLabel_20_5" style:display-name="ListLabel 5" style:family="text">
      <style:text-properties style:text-line-through-style="none" style:text-line-through-type="none"/>
    </style:style>
    <style:style style:name="ListLabel_20_6" style:display-name="ListLabel 6" style:family="text">
      <style:text-properties style:text-line-through-style="none" style:text-line-through-type="none"/>
    </style:style>
    <style:style style:name="ListLabel_20_7" style:display-name="ListLabel 7" style:family="text">
      <style:text-properties style:text-line-through-style="none" style:text-line-through-type="none"/>
    </style:style>
    <style:style style:name="ListLabel_20_8" style:display-name="ListLabel 8" style:family="text">
      <style:text-properties style:text-line-through-style="none" style:text-line-through-type="none"/>
    </style:style>
    <style:style style:name="ListLabel_20_9" style:display-name="ListLabel 9" style:family="text">
      <style:text-properties style:text-line-through-style="none" style:text-line-through-type="non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6252in" fo:margin-bottom="0.0626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1T05:10:59.927465583</meta:creation-date>
    <dc:date>2026-07-15T11:36:47.506806253</dc:date>
    <meta:editing-duration>P133DT22H22M24S</meta:editing-duration>
    <meta:editing-cycles>1025</meta:editing-cycles>
    <meta:generator>LibreOffice/24.2.7.2$Linux_X86_64 LibreOffice_project/420$Build-2</meta:generator>
    <meta:print-date>2025-07-28T09:12:13.043255035</meta:print-date>
    <meta:printed-by>PDF files</meta:printed-by>
    <meta:document-statistic meta:table-count="0" meta:image-count="0" meta:object-count="0" meta:page-count="1" meta:paragraph-count="17" meta:word-count="401" meta:character-count="1989" meta:non-whitespace-character-count="1594"/>
  </office:meta>
</office:document-meta>
</file>